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32B8E64DF7F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83cm" fo:min-width="0.033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82cm" fo:min-width="0.032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83cm" fo:min-width="0.032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83cm" fo:min-width="1.031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81cm" fo:min-width="0.032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83cm" fo:min-width="1.595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15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Arrowheads_20_16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Arrowheads_20_17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684cm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heads_20_18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63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0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396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73cm" fo:min-width="0.093cm" fo:padding-top="0.142cm" fo:padding-bottom="0.142cm" fo:padding-left="0.267cm" fo:padding-right="0.267cm" loext:decorative="false"/>
      <style:paragraph-properties style:writing-mode="lr-tb"/>
    </style:style>
    <style:style style:name="gr21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="Arrowheads_20_20" draw:marker-end-width="0.3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000000" draw:marker-start-width="0.279cm" draw:marker-end="Arrowheads_20_21" draw:marker-end-width="0.3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5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053cm" svg:stroke-color="#000000" draw:marker-start-width="0.279cm" draw:marker-end="Arrowheads_20_22" draw:marker-end-width="0.379cm" draw:fill="none" draw:textarea-vertical-align="middle" fo:padding-top="0.151cm" fo:padding-bottom="0.151cm" fo:padding-left="0.276cm" fo:padding-right="0.276cm" loext:decorative="false"/>
    </style:style>
    <style:style style:name="gr27" style:family="graphic" style:parent-style-name="objectwithoutfill">
      <style:graphic-properties svg:stroke-width="0.081cm" svg:stroke-color="#000000" draw:marker-start="Arrow_20_short" draw:marker-start-width="0.321cm" draw:marker-end-width="0.321cm" draw:fill="none" draw:textarea-vertical-align="middle" fo:padding-top="0.165cm" fo:padding-bottom="0.165cm" fo:padding-left="0.29cm" fo:padding-right="0.29cm" draw:shadow-offset-x="0.203cm" draw:shadow-offset-y="0.203cm" loext:decorative="false"/>
    </style:style>
    <style:style style:name="gr28" style:family="graphic" style:parent-style-name="objectwithoutfill">
      <style:graphic-properties svg:stroke-width="0.081cm" svg:stroke-color="#000000" draw:marker-start="Arrow_20_short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81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54cm" svg:y1="18.391cm" svg:x2="3.554cm" svg:y2="23.709cm">
          <text:p/>
        </draw:line>
        <draw:line draw:style-name="gr1" draw:text-style-name="P1" draw:layer="layout" svg:x1="3.554cm" svg:y1="23.709cm" svg:x2="17.588cm" svg:y2="23.709cm">
          <text:p/>
        </draw:line>
        <draw:custom-shape draw:style-name="gr2" draw:text-style-name="P3" xml:id="id3" draw:id="id3" draw:layer="layout" svg:width="0.801cm" svg:height="0.801cm" svg:x="3.156cm" svg:y="21.331cm">
          <text:p text:style-name="P2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4" draw:id="id4" draw:layer="layout" svg:width="0.8cm" svg:height="0.8cm" svg:x="5.958cm" svg:y="22.328cm">
          <text:p text:style-name="P2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5" draw:id="id5" draw:layer="layout" svg:width="0.8cm" svg:height="0.801cm" svg:x="8.029cm" svg:y="21.312cm">
          <text:p text:style-name="P2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6" draw:id="id6" draw:layer="layout" svg:width="2.211cm" svg:height="0.801cm" svg:x="10.111cm" svg:y="21.90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0.8cm" svg:height="0.799cm" svg:x="16.73cm" svg:y="23.31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" draw:id="id1" draw:layer="layout" svg:width="3.009cm" svg:height="0.801cm" svg:x="12.789cm" svg:y="20.291cm">
          <text:p text:style-name="P2">Rele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5.798cm" svg:y1="20.692cm" svg:x2="17.13cm" svg:y2="23.315cm" draw:start-shape="id1" draw:start-glue-point="10" draw:end-shape="id2" draw:end-glue-point="4" svg:d="M15798 20692l1332 2623" svg:viewBox="0 0 1333 2624">
          <text:p/>
        </draw:connector>
        <draw:connector draw:style-name="gr9" draw:text-style-name="P1" draw:layer="layout" draw:type="line" svg:x1="3.957cm" svg:y1="21.732cm" svg:x2="5.958cm" svg:y2="22.728cm" draw:start-shape="id3" draw:start-glue-point="10" draw:end-shape="id4" draw:end-glue-point="6" svg:d="M3957 21732l2001 996" svg:viewBox="0 0 2002 997">
          <text:p/>
        </draw:connector>
        <draw:connector draw:style-name="gr10" draw:text-style-name="P1" draw:layer="layout" draw:type="line" svg:x1="6.758cm" svg:y1="22.728cm" svg:x2="8.029cm" svg:y2="21.713cm" draw:start-shape="id4" draw:start-glue-point="10" draw:end-shape="id5" draw:end-glue-point="6" svg:d="M6758 22728l1271-1015" svg:viewBox="0 0 1272 1016">
          <text:p/>
        </draw:connector>
        <draw:frame draw:style-name="gr11" draw:text-style-name="P4" draw:layer="layout" svg:width="1.998cm" svg:height="0.962cm" svg:x="4.365cm" svg:y="18.898cm">
          <draw:text-box>
            <text:p>0→3</text:p>
          </draw:text-box>
        </draw:frame>
        <draw:connector draw:style-name="gr12" draw:text-style-name="P1" draw:layer="layout" draw:type="line" svg:x1="8.829cm" svg:y1="21.713cm" svg:x2="10.111cm" svg:y2="22.302cm" draw:start-shape="id5" draw:start-glue-point="10" draw:end-shape="id6" draw:end-glue-point="6" svg:d="M8829 21713l1282 589" svg:viewBox="0 0 1283 590">
          <text:p/>
        </draw:connector>
        <draw:connector draw:style-name="gr13" draw:text-style-name="P1" draw:layer="layout" draw:type="curve" draw:line-skew="-2.2cm" svg:x1="11.217cm" svg:y1="21.901cm" svg:x2="3.557cm" svg:y2="21.331cm" draw:start-shape="id6" draw:start-glue-point="4" draw:end-shape="id3" draw:end-glue-point="4" svg:d="M11217 21901c0-4933-7660-4648-7660-570" svg:viewBox="0 0 7661 3666">
          <text:p/>
        </draw:connector>
        <draw:connector draw:style-name="gr13" draw:text-style-name="P1" draw:layer="layout" draw:type="curve" draw:line-skew="-2.184cm" svg:x1="11.217cm" svg:y1="21.901cm" svg:x2="6.358cm" svg:y2="22.328cm" draw:start-shape="id6" draw:start-glue-point="4" draw:end-shape="id4" draw:end-glue-point="4" svg:d="M11217 21901c0-4054-4859-4268-4859 427" svg:viewBox="0 0 4860 3496">
          <text:p/>
        </draw:connector>
        <draw:connector draw:style-name="gr13" draw:text-style-name="P1" draw:layer="layout" draw:type="curve" draw:line-skew="-0.609cm" svg:x1="11.217cm" svg:y1="21.901cm" svg:x2="8.429cm" svg:y2="21.312cm" draw:start-shape="id6" draw:start-glue-point="4" draw:end-shape="id5" draw:end-glue-point="4" svg:d="M11217 21901c0-2575-2788-2281-2788-589" svg:viewBox="0 0 2789 1898">
          <text:p/>
        </draw:connector>
        <draw:frame draw:style-name="gr14" draw:text-style-name="P4" draw:layer="layout" svg:width="2.022cm" svg:height="0.962cm" svg:x="7.886cm" svg:y="18.732cm">
          <draw:text-box>
            <text:p>1→3</text:p>
          </draw:text-box>
        </draw:frame>
        <draw:frame draw:style-name="gr15" draw:text-style-name="P4" draw:layer="layout" svg:width="2.047cm" svg:height="0.962cm" svg:x="8.769cm" svg:y="20.163cm">
          <draw:text-box>
            <text:p>2→3</text:p>
          </draw:text-box>
        </draw:frame>
        <draw:frame draw:style-name="gr16" draw:text-style-name="P4" draw:layer="layout" svg:width="13.618cm" svg:height="2.384cm" svg:x="3.71cm" svg:y="25.68cm">
          <draw:text-box>
            <text:p>The mix envelope either loops or holds at P3 until the key is released. Then it moves to P4.</text:p>
          </draw:text-box>
        </draw:frame>
        <draw:frame draw:style-name="gr17" draw:text-style-name="P6" draw:layer="layout" svg:width="1.089cm" svg:height="0.725cm" svg:x="4.151cm" svg:y="22.23cm">
          <draw:text-box>
            <text:p text:style-name="P5"><text:span text:style-name="T1">R1</text:span></text:p>
          </draw:text-box>
        </draw:frame>
        <draw:frame draw:style-name="gr17" draw:text-style-name="P6" draw:layer="layout" svg:width="1.089cm" svg:height="0.725cm" svg:x="7.083cm" svg:y="22.335cm">
          <draw:text-box>
            <text:p text:style-name="P5"><text:span text:style-name="T1">R2</text:span></text:p>
          </draw:text-box>
        </draw:frame>
        <draw:frame draw:style-name="gr17" draw:text-style-name="P6" draw:layer="layout" svg:width="1.089cm" svg:height="0.725cm" svg:x="9.029cm" svg:y="21.324cm">
          <draw:text-box>
            <text:p text:style-name="P5"><text:span text:style-name="T1">R3</text:span></text:p>
          </draw:text-box>
        </draw:frame>
        <draw:frame draw:style-name="gr17" draw:text-style-name="P6" draw:layer="layout" svg:width="1.089cm" svg:height="0.725cm" svg:x="15.334cm" svg:y="21.818cm">
          <draw:text-box>
            <text:p text:style-name="P5"><text:span text:style-name="T1">R4</text:span></text:p>
          </draw:text-box>
        </draw:frame>
        <draw:frame draw:style-name="gr18" draw:text-style-name="P7" draw:layer="layout" svg:width="13.119cm" svg:height="5.541cm" svg:x="3.249cm" svg:y="1.461cm">
          <draw:image xlink:href="Pictures/10000000000007800000032B8E64DF7F.png" xlink:type="simple" xlink:show="embed" xlink:actuate="onLoad" draw:mime-type="image/png">
            <text:p/>
          </draw:image>
        </draw:frame>
        <draw:line draw:style-name="gr1" draw:text-style-name="P1" draw:layer="layout" svg:x1="3.58cm" svg:y1="9.546cm" svg:x2="3.58cm" svg:y2="14.786cm">
          <text:p/>
        </draw:line>
        <draw:line draw:style-name="gr1" draw:text-style-name="P1" draw:layer="layout" svg:x1="17.017cm" svg:y1="14.811cm" svg:x2="3.58cm" svg:y2="14.811cm">
          <text:p/>
        </draw:line>
        <draw:frame draw:style-name="gr19" draw:text-style-name="P4" draw:layer="layout" svg:width="2.983cm" svg:height="1.038cm" svg:x="1.92cm" svg:y="15.304cm">
          <draw:text-box>
            <text:p>Note On</text:p>
          </draw:text-box>
        </draw:frame>
        <draw:frame draw:style-name="gr19" draw:text-style-name="P4" draw:layer="layout" svg:width="2.983cm" svg:height="1.038cm" svg:x="12.271cm" svg:y="15.33cm">
          <draw:text-box>
            <text:p>Note Off</text:p>
          </draw:text-box>
        </draw:frame>
        <draw:custom-shape draw:style-name="gr2" draw:text-style-name="P3" xml:id="id7" draw:id="id7" draw:layer="layout" svg:width="0.801cm" svg:height="0.801cm" svg:x="3.182cm" svg:y="10.696cm">
          <text:p text:style-name="P2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8" draw:id="id8" draw:layer="layout" svg:width="0.8cm" svg:height="0.8cm" svg:x="4.999cm" svg:y="12.783cm">
          <text:p text:style-name="P2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9" draw:id="id9" draw:layer="layout" svg:width="0.8cm" svg:height="0.801cm" svg:x="7.564cm" svg:y="11.325cm">
          <text:p text:style-name="P2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xml:id="id10" draw:id="id10" draw:layer="layout" svg:width="0.887cm" svg:height="0.927cm" svg:x="10.32cm" svg:y="12.327cm">
          <text:p text:style-name="P2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12" draw:id="id12" draw:layer="layout" svg:width="0.8cm" svg:height="0.799cm" svg:x="16.498cm" svg:y="14.41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draw:type="line" svg:x1="3.983cm" svg:y1="11.097cm" svg:x2="5.116cm" svg:y2="12.9cm" draw:start-shape="id7" draw:start-glue-point="10" draw:end-shape="id8" draw:end-glue-point="5" svg:d="M3983 11097l1133 1803" svg:viewBox="0 0 1134 1804">
          <text:p/>
        </draw:connector>
        <draw:connector draw:style-name="gr22" draw:text-style-name="P1" draw:layer="layout" draw:type="line" svg:x1="5.799cm" svg:y1="13.183cm" svg:x2="7.564cm" svg:y2="11.726cm" draw:start-shape="id8" draw:start-glue-point="10" draw:end-shape="id9" draw:end-glue-point="6" svg:d="M5799 13183l1765-1457" svg:viewBox="0 0 1766 1458">
          <text:p/>
        </draw:connector>
        <draw:connector draw:style-name="gr23" draw:text-style-name="P1" draw:layer="layout" draw:type="line" svg:x1="8.364cm" svg:y1="11.726cm" svg:x2="10.32cm" svg:y2="12.79cm" draw:start-shape="id9" draw:start-glue-point="10" draw:end-shape="id10" draw:end-glue-point="6" svg:d="M8364 11726l1956 1064" svg:viewBox="0 0 1957 1065">
          <text:p/>
        </draw:connector>
        <draw:line draw:style-name="gr24" draw:text-style-name="P1" xml:id="id11" draw:id="id11" draw:layer="layout" svg:x1="11.232cm" svg:y1="12.84cm" svg:x2="13.255cm" svg:y2="12.84cm">
          <text:p/>
        </draw:line>
        <draw:line draw:style-name="gr25" draw:text-style-name="P1" draw:layer="layout" svg:x1="13.281cm" svg:y1="15.349cm" svg:x2="13.281cm" svg:y2="12.391cm">
          <text:p/>
        </draw:line>
        <draw:connector draw:style-name="gr26" draw:text-style-name="P1" draw:layer="layout" draw:type="line" svg:x1="13.255cm" svg:y1="12.84cm" svg:x2="16.615cm" svg:y2="14.535cm" draw:start-shape="id11" draw:start-glue-point="1" draw:end-shape="id12" draw:end-glue-point="5" svg:d="M13255 12840l3360 1695" svg:viewBox="0 0 3361 1696">
          <text:p/>
        </draw:connector>
        <draw:line draw:style-name="gr27" draw:text-style-name="P1" draw:layer="layout" svg:x1="3.684cm" svg:y1="9.598cm" svg:x2="10.765cm" svg:y2="9.598cm">
          <text:p/>
        </draw:line>
        <draw:line draw:style-name="gr28" draw:text-style-name="P1" draw:layer="layout" svg:x1="5.422cm" svg:y1="10.116cm" svg:x2="10.688cm" svg:y2="10.116cm">
          <text:p/>
        </draw:line>
        <draw:line draw:style-name="gr28" draw:text-style-name="P1" draw:layer="layout" svg:x1="7.964cm" svg:y1="10.635cm" svg:x2="10.714cm" svg:y2="10.635cm">
          <text:p/>
        </draw:line>
        <draw:frame draw:style-name="gr29" draw:text-style-name="P4" draw:layer="layout" svg:width="5.577cm" svg:height="1.063cm" svg:x="11.31cm" svg:y="9.546cm">
          <draw:text-box>
            <text:p>Mix Env Loop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0:32:43.547642797</meta:creation-date>
    <dc:date>2026-05-14T14:05:05.342475320</dc:date>
    <meta:editing-duration>PT2H55M27S</meta:editing-duration>
    <meta:editing-cycles>8</meta:editing-cycles>
    <meta:generator>LibreOffice/24.2.7.2$Linux_X86_64 LibreOffice_project/420$Build-2</meta:generator>
    <meta:document-statistic meta:object-count="43"/>
  </office:meta>
</office:document-meta>
</file>
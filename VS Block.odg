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linecap="round" draw:fill="solid" draw:fill-color="#b4c7dc" draw:textarea-horizontal-align="justify" draw:textarea-vertical-align="middle" draw:auto-grow-height="false" fo:min-height="1.508cm" fo:min-width="1.975cm" fo:padding-top="0.142cm" fo:padding-bottom="0.142cm" fo:padding-left="0.267cm" fo:padding-right="0.267cm" draw:shadow="visible" draw:shadow-offset-x="0.141cm" draw:shadow-offset-y="0.141cm" draw:shadow-color="#666666" loext:shadow-blur="0.106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linecap="round" draw:fill="solid" draw:fill-color="#ffaa95" draw:textarea-horizontal-align="justify" draw:textarea-vertical-align="middle" draw:auto-grow-height="false" fo:min-height="1.975cm" fo:min-width="1.825cm" fo:padding-top="0.142cm" fo:padding-bottom="0.142cm" fo:padding-left="0.267cm" fo:padding-right="0.267cm" draw:shadow="visible" draw:shadow-offset-x="0.141cm" draw:shadow-offset-y="0.141cm" draw:shadow-color="#666666" loext:shadow-blur="0.106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linecap="round" draw:fill-color="#ffaa95" draw:textarea-horizontal-align="justify" draw:textarea-vertical-align="middle" draw:auto-grow-height="false" fo:min-height="1.975cm" fo:min-width="1.825cm" fo:padding-top="0.142cm" fo:padding-bottom="0.142cm" fo:padding-left="0.267cm" fo:padding-right="0.267cm" draw:shadow="visible" draw:shadow-offset-x="0.141cm" draw:shadow-offset-y="0.141cm" loext:shadow-blur="0.106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linecap="round" draw:fill="solid" draw:fill-color="#e0c2cd" draw:textarea-horizontal-align="justify" draw:textarea-vertical-align="middle" draw:auto-grow-height="false" fo:min-height="2.868cm" fo:min-width="3.185cm" fo:padding-top="0.142cm" fo:padding-bottom="0.142cm" fo:padding-left="0.267cm" fo:padding-right="0.267cm" draw:shadow="visible" draw:shadow-offset-x="0.141cm" draw:shadow-offset-y="0.141cm" draw:shadow-color="#666666" loext:shadow-blur="0.106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Arrowheads_20_6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6" style:family="graphic" style:parent-style-name="objectwithoutfill">
      <style:graphic-properties draw:stroke="solid" svg:stroke-width="0.035cm" svg:stroke-color="#000000" draw:marker-start-width="0.252cm" draw:marker-end="Arrowheads_20_7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heads_20_8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8" style:family="graphic" style:parent-style-name="objectwithoutfill">
      <style:graphic-properties draw:stroke="solid" svg:stroke-width="0.035cm" svg:stroke-color="#000000" draw:marker-start-width="0.252cm" draw:marker-end="Arrowheads_20_9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svg:stroke-linecap="round" draw:fill="solid" draw:fill-color="#e0c2cd" draw:textarea-horizontal-align="justify" draw:textarea-vertical-align="middle" draw:auto-grow-height="false" fo:min-height="2.679cm" fo:min-width="2.94cm" fo:padding-top="0.142cm" fo:padding-bottom="0.142cm" fo:padding-left="0.267cm" fo:padding-right="0.267cm" draw:shadow="visible" draw:shadow-offset-x="0.141cm" draw:shadow-offset-y="0.141cm" draw:shadow-color="#666666" loext:shadow-blur="0.106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35cm" svg:stroke-color="#000000" draw:marker-start-width="0.252cm" draw:marker-end="Arrowheads_20_10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svg:stroke-linecap="round" draw:fill-color="#afd095" draw:textarea-horizontal-align="justify" draw:textarea-vertical-align="middle" draw:auto-grow-height="false" fo:min-height="2.982cm" fo:min-width="2.732cm" fo:padding-top="0.142cm" fo:padding-bottom="0.142cm" fo:padding-left="0.267cm" fo:padding-right="0.267cm" draw:shadow="visible" draw:shadow-offset-x="0.141cm" draw:shadow-offset-y="0.141cm" loext:shadow-blur="0.106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svg:stroke-width="0.035cm" svg:stroke-color="#000000" draw:marker-start-width="0.252cm" draw:marker-end="Arrowheads_20_11" draw:marker-end-width="0.352cm" svg:stroke-linecap="round" draw:fill="none" draw:textarea-vertical-align="middle" fo:padding-top="0.142cm" fo:padding-bottom="0.142cm" fo:padding-left="0.267cm" fo:padding-right="0.267cm" draw:shadow="visible" draw:shadow-offset-x="0.141cm" draw:shadow-offset-y="0.141cm" loext:shadow-blur="0.106cm" loext:decorative="false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svg:stroke-linecap="round" draw:fill-color="#afd095" draw:textarea-horizontal-align="justify" draw:textarea-vertical-align="middle" draw:auto-grow-height="false" fo:min-height="2.679cm" fo:min-width="2.94cm" fo:padding-top="0.142cm" fo:padding-bottom="0.142cm" fo:padding-left="0.267cm" fo:padding-right="0.267cm" draw:shadow="visible" draw:shadow-offset-x="0.141cm" draw:shadow-offset-y="0.141cm" loext:shadow-blur="0.106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solid" svg:stroke-width="0.035cm" svg:stroke-color="#000000" draw:marker-start-width="0.252cm" draw:marker-end="Arrowheads_20_12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15" style:family="graphic" style:parent-style-name="objectwithoutfill">
      <style:graphic-properties draw:stroke="solid" svg:stroke-width="0.035cm" svg:stroke-color="#000000" draw:marker-start-width="0.252cm" draw:marker-end="Arrowheads_20_13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svg:stroke-linecap="round" draw:fill-color="#ffe994" draw:textarea-horizontal-align="justify" draw:textarea-vertical-align="middle" draw:auto-grow-height="false" fo:min-height="2.753cm" fo:min-width="2.28cm" fo:padding-top="0.142cm" fo:padding-bottom="0.142cm" fo:padding-left="0.267cm" fo:padding-right="0.267cm" draw:shadow="hidden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svg:stroke-linecap="round" draw:fill-color="#dee6ef" draw:textarea-horizontal-align="justify" draw:textarea-vertical-align="middle" draw:auto-grow-height="false" fo:min-height="2.49cm" fo:min-width="3.034cm" fo:padding-top="0.142cm" fo:padding-bottom="0.142cm" fo:padding-left="0.267cm" fo:padding-right="0.267cm" draw:shadow="visible" draw:shadow-offset-x="0.141cm" draw:shadow-offset-y="0.141cm" loext:shadow-blur="0.106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solid" svg:stroke-width="0.035cm" svg:stroke-color="#000000" draw:marker-start-width="0.252cm" draw:marker-end="Arrowheads_20_16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svg:stroke-linecap="round" draw:fill-color="#dee6ef" draw:textarea-horizontal-align="justify" draw:textarea-vertical-align="middle" draw:auto-grow-height="false" fo:min-height="2.679cm" fo:min-width="2.94cm" fo:padding-top="0.142cm" fo:padding-bottom="0.142cm" fo:padding-left="0.267cm" fo:padding-right="0.267cm" draw:shadow="visible" draw:shadow-offset-x="0.141cm" draw:shadow-offset-y="0.141cm" loext:shadow-blur="0.106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000000" draw:marker-start-width="0.252cm" draw:marker-end="Arrowheads_20_17" draw:marker-end-width="0.352cm" svg:stroke-linecap="round" draw:fill="none" draw:textarea-vertical-align="middle" fo:padding-top="0.142cm" fo:padding-bottom="0.142cm" fo:padding-left="0.267cm" fo:padding-right="0.267cm" draw:shadow="hidden" loext:decorative="false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svg:stroke-linecap="round" draw:fill-color="#ffffff" draw:textarea-horizontal-align="justify" draw:textarea-vertical-align="middle" draw:auto-grow-height="false" fo:min-height="1.64cm" fo:min-width="15.98cm" fo:padding-top="0.142cm" fo:padding-bottom="0.142cm" fo:padding-left="0.267cm" fo:padding-right="0.267cm" draw:shadow="visible" draw:shadow-offset-x="0.141cm" draw:shadow-offset-y="0.141cm" loext:shadow-blur="0.106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stroke="solid"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draw:stroke="solid"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draw:stroke="solid"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draw:stroke="solid"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draw:stroke="solid" svg:stroke-width="0.035cm" svg:stroke-color="#000000" draw:marker-start-width="0.252cm" draw:marker-end="Arrowheads_20_23" draw:marker-end-width="0.3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draw:stroke="solid" svg:stroke-width="0.035cm" svg:stroke-color="#000000" draw:marker-start-width="0.252cm" draw:marker-end="Arrowheads_20_24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draw:stroke="solid" svg:stroke-width="0.035cm" svg:stroke-color="#000000" draw:marker-start-width="0.252cm" draw:marker-end="Arrowheads_20_25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aa95"/>
      <style:paragraph-properties fo:text-align="center" style:writing-mode="lr-tb"/>
    </style:style>
    <style:style style:name="P5" style:family="paragraph">
      <loext:graphic-properties draw:fill-color="#ffaa95"/>
      <style:paragraph-properties fo:text-align="center" style:writing-mode="lr-tb"/>
    </style:style>
    <style:style style:name="P6" style:family="paragraph">
      <loext:graphic-properties draw:fill="solid" draw:fill-color="#e0c2cd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-color="#ffe994"/>
      <style:paragraph-properties fo:text-align="center" style:writing-mode="lr-tb"/>
    </style:style>
    <style:style style:name="P10" style:family="paragraph">
      <loext:graphic-properties draw:fill-color="#dee6ef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75cm" svg:height="1.758cm" svg:x="3.464cm" svg:y="6.042cm">
          <text:p text:style-name="P1">Osc A</text:p>
          <text:p text:style-name="P1"><text:span text:style-name="T1">Wavefo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75cm" svg:height="1.758cm" svg:x="3.464cm" svg:y="8.253cm">
          <text:p text:style-name="P1">Osc B</text:p>
          <text:p text:style-name="P3"><text:span text:style-name="T1">Wavefo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475cm" svg:height="1.758cm" svg:x="3.464cm" svg:y="10.446cm">
          <text:p text:style-name="P1">Osc C</text:p>
          <text:p text:style-name="P3"><text:span text:style-name="T1">Wavefo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475cm" svg:height="1.758cm" svg:x="3.464cm" svg:y="12.694cm">
          <text:p text:style-name="P1">Osc D</text:p>
          <text:p text:style-name="P3"><text:span text:style-name="T1">Wave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2.325cm" svg:height="2.225cm" svg:x="1.385cm" svg:y="16.58cm">
          <text:p text:style-name="P1">LFO 2</text:p>
          <text:p text:style-name="P1"><text:span text:style-name="T1">Pitc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2.325cm" svg:height="2.225cm" svg:x="15.354cm" svg:y="13.28cm">
          <text:p text:style-name="P1">LFO 1</text:p>
          <text:p text:style-name="P1"><text:span text:style-name="T1">Cutoff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685cm" svg:height="3.118cm" svg:x="8.245cm" svg:y="8.884cm">
          <text:p text:style-name="P1">MIX</text:p>
          <text:p text:style-name="P1"><text:span text:style-name="T1">1 2 3 4</text:span></text:p>
          <text:p text:style-name="P1"><text:span text:style-name="T1">Loop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939cm" svg:y1="6.921cm" svg:x2="8.245cm" svg:y2="10.443cm" draw:start-shape="id1" draw:start-glue-point="1" draw:end-shape="id2" draw:end-glue-point="3" svg:d="M5939 6921h1276v3522h1030" svg:viewBox="0 0 2307 3523">
          <text:p/>
        </draw:connector>
        <draw:connector draw:style-name="gr6" draw:text-style-name="P7" draw:layer="layout" svg:x1="5.939cm" svg:y1="9.132cm" svg:x2="8.245cm" svg:y2="10.443cm" draw:start-shape="id3" draw:start-glue-point="1" draw:end-shape="id2" draw:end-glue-point="3" svg:d="M5939 9132h1276v1311h1030" svg:viewBox="0 0 2307 1312">
          <text:p/>
        </draw:connector>
        <draw:connector draw:style-name="gr7" draw:text-style-name="P7" draw:layer="layout" svg:x1="5.939cm" svg:y1="11.325cm" svg:x2="8.245cm" svg:y2="10.443cm" draw:start-shape="id4" draw:start-glue-point="1" draw:end-shape="id2" draw:end-glue-point="3" svg:d="M5939 11325h1276v-882h1030" svg:viewBox="0 0 2307 883">
          <text:p/>
        </draw:connector>
        <draw:connector draw:style-name="gr8" draw:text-style-name="P7" draw:layer="layout" svg:x1="5.939cm" svg:y1="13.573cm" svg:x2="8.245cm" svg:y2="10.443cm" draw:start-shape="id5" draw:start-glue-point="1" draw:end-shape="id2" draw:end-glue-point="3" svg:d="M5939 13573h1276v-3130h1030" svg:viewBox="0 0 2307 3131">
          <text:p/>
        </draw:connector>
        <draw:custom-shape draw:style-name="gr9" draw:text-style-name="P6" xml:id="id6" draw:id="id6" draw:layer="layout" svg:width="3.44cm" svg:height="2.929cm" svg:x="8.367cm" svg:y="15.929cm">
          <text:p text:style-name="P1">MIX Env</text:p>
          <text:p text:style-name="P1"><text:span text:style-name="T1">R1 R2 R3 R4</text:span></text:p>
          <text:p text:style-name="P1"><text:span text:style-name="T1"><text:s text:c="2"/></text:span><text:span text:style-name="T1">1 <text:s/>2 <text:s/>3 <text:s/>4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0.087cm" svg:y1="15.929cm" svg:x2="10.087cm" svg:y2="12.002cm" draw:start-shape="id6" draw:start-glue-point="0" draw:end-shape="id2" draw:end-glue-point="2" svg:d="M10087 15929v-3927" svg:viewBox="0 0 1 3928">
          <text:p/>
        </draw:connector>
        <draw:custom-shape draw:style-name="gr11" draw:text-style-name="P8" xml:id="id7" draw:id="id7" draw:layer="layout" svg:width="3.232cm" svg:height="3.232cm" svg:x="13.083cm" svg:y="8.827cm">
          <text:p text:style-name="P1">Filter</text:p>
          <text:p text:style-name="P1"><text:span text:style-name="T1">Cutoff</text:span></text:p>
          <text:p text:style-name="P1"><text:span text:style-name="T1">Reso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1.93cm" svg:y1="10.443cm" svg:x2="13.083cm" svg:y2="10.443cm" draw:start-shape="id2" draw:start-glue-point="1" draw:end-shape="id7" svg:d="M11930 10443h1153" svg:viewBox="0 0 1154 1">
          <text:p/>
        </draw:connector>
        <draw:custom-shape draw:style-name="gr13" draw:text-style-name="P8" xml:id="id8" draw:id="id8" draw:layer="layout" svg:width="3.44cm" svg:height="2.929cm" svg:x="12.979cm" svg:y="15.929cm">
          <text:p text:style-name="P1">Filter Env <text:span text:style-name="T1">Cutoff</text:span></text:p>
          <text:p text:style-name="P1"><text:span text:style-name="T2">A D S R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14.699cm" svg:y1="15.929cm" svg:x2="14.699cm" svg:y2="12.059cm" draw:start-shape="id8" draw:start-glue-point="0" draw:end-shape="id7" draw:end-glue-point="2" svg:d="M14699 15929v-3870" svg:viewBox="0 0 1 3871">
          <text:p/>
        </draw:connector>
        <draw:connector draw:style-name="gr15" draw:text-style-name="P7" draw:layer="layout" svg:x1="16.516cm" svg:y1="13.28cm" svg:x2="14.699cm" svg:y2="12.059cm" draw:start-shape="id9" draw:start-glue-point="0" draw:end-shape="id7" draw:end-glue-point="2" svg:d="M16516 13280v-487h-1817v-734" svg:viewBox="0 0 1818 1222">
          <text:p/>
        </draw:connector>
        <draw:custom-shape draw:style-name="gr16" draw:text-style-name="P9" xml:id="id18" draw:id="id18" draw:layer="layout" svg:width="2.814cm" svg:height="3.037cm" svg:x="22.813cm" svg:y="8.925cm">
          <text:p text:style-name="P1">Effects</text:p>
          <text:p text:style-name="P1"><text:span text:style-name="T1">Chorus</text:span></text:p>
          <text:p text:style-name="P1"><text:span text:style-name="T1">Ensemble</text:span></text:p>
          <text:p text:style-name="P1"><text:span text:style-name="T1">Reverb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xml:id="id11" draw:id="id11" draw:layer="layout" svg:width="3.534cm" svg:height="2.74cm" svg:x="18.057cm" svg:y="9.073cm">
          <text:p text:style-name="P1">Amp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25.632cm" svg:y1="9.841cm" svg:x2="26.728cm" svg:y2="9.86cm">
          <text:p/>
        </draw:line>
        <draw:line draw:style-name="gr18" draw:text-style-name="P7" draw:layer="layout" svg:x1="25.632cm" svg:y1="10.98cm" svg:x2="26.728cm" svg:y2="10.999cm">
          <text:p/>
        </draw:line>
        <draw:custom-shape draw:style-name="gr19" draw:text-style-name="P10" xml:id="id10" draw:id="id10" draw:layer="layout" svg:width="3.44cm" svg:height="2.929cm" svg:x="18.104cm" svg:y="15.929cm">
          <text:p text:style-name="P1">Amp Env <text:span text:style-name="T1">Volume</text:span></text:p>
          <text:p text:style-name="P1"><text:span text:style-name="T2">A D S R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19.824cm" svg:y1="15.929cm" svg:x2="19.824cm" svg:y2="11.813cm" draw:start-shape="id10" draw:start-glue-point="0" draw:end-shape="id11" draw:end-glue-point="2" svg:d="M19824 15929v-4116" svg:viewBox="0 0 1 4117">
          <text:p/>
        </draw:connector>
        <draw:custom-shape draw:style-name="gr21" draw:text-style-name="P11" xml:id="id16" draw:id="id16" draw:layer="layout" svg:width="16.48cm" svg:height="1.89cm" svg:x="3.445cm" svg:y="2.273cm">
          <text:p text:style-name="P1">Keyboard / Arp / Seq / MIDI</text:p>
          <draw:enhanced-geometry svg:viewBox="0 0 21600 21600" draw:type="rectangle" draw:enhanced-path="M 0 0 L 21600 0 21600 21600 0 21600 0 0 Z N"/>
        </draw:custom-shape>
        <draw:connector draw:style-name="gr22" draw:text-style-name="P7" xml:id="id13" draw:id="id13" draw:layer="layout" svg:x1="2.547cm" svg:y1="16.58cm" svg:x2="3.464cm" svg:y2="13.573cm" draw:start-shape="id12" draw:start-glue-point="0" draw:end-shape="id5" draw:end-glue-point="3" svg:d="M2547 16580v-3007h917" svg:viewBox="0 0 918 3008">
          <text:p/>
        </draw:connector>
        <draw:connector draw:style-name="gr23" draw:text-style-name="P7" xml:id="id14" draw:id="id14" draw:layer="layout" svg:x1="2.547cm" svg:y1="13.573cm" svg:x2="3.464cm" svg:y2="11.325cm" draw:start-shape="id13" draw:start-glue-point="0" draw:end-shape="id4" draw:end-glue-point="3" svg:d="M2547 13573v-2248h917" svg:viewBox="0 0 918 2249">
          <text:p/>
        </draw:connector>
        <draw:connector draw:style-name="gr24" draw:text-style-name="P7" xml:id="id15" draw:id="id15" draw:layer="layout" svg:x1="2.547cm" svg:y1="11.325cm" svg:x2="3.464cm" svg:y2="9.132cm" draw:start-shape="id14" draw:start-glue-point="0" draw:end-shape="id3" draw:end-glue-point="3" svg:d="M2547 11325v-2193h917" svg:viewBox="0 0 918 2194">
          <text:p/>
        </draw:connector>
        <draw:connector draw:style-name="gr25" draw:text-style-name="P7" xml:id="id17" draw:id="id17" draw:layer="layout" svg:x1="2.547cm" svg:y1="9.132cm" svg:x2="3.464cm" svg:y2="6.921cm" draw:start-shape="id15" draw:start-glue-point="0" draw:end-shape="id1" draw:end-glue-point="3" svg:d="M2547 9132v-2211h917" svg:viewBox="0 0 918 2212">
          <text:p/>
        </draw:connector>
        <draw:connector draw:style-name="gr26" draw:text-style-name="P7" draw:layer="layout" svg:x1="3.445cm" svg:y1="3.218cm" svg:x2="2.547cm" svg:y2="6.921cm" draw:start-shape="id16" draw:start-glue-point="3" draw:end-shape="id17" draw:end-glue-point="0" svg:d="M3445 3218h-898v3703" svg:viewBox="0 0 899 3704">
          <text:p/>
        </draw:connector>
        <draw:connector draw:style-name="gr27" draw:text-style-name="P7" draw:layer="layout" svg:x1="16.315cm" svg:y1="10.443cm" svg:x2="18.057cm" svg:y2="10.443cm" draw:start-shape="id7" draw:start-glue-point="1" draw:end-shape="id11" draw:end-glue-point="3" svg:d="M16315 10443h1742" svg:viewBox="0 0 1743 1">
          <text:p/>
        </draw:connector>
        <draw:connector draw:style-name="gr28" draw:text-style-name="P7" draw:layer="layout" svg:x1="21.591cm" svg:y1="10.443cm" svg:x2="22.813cm" svg:y2="10.443cm" draw:start-shape="id11" draw:start-glue-point="1" draw:end-shape="id18" draw:end-glue-point="3" svg:d="M21591 10443h1222" svg:viewBox="0 0 1223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3:03:22.278250248</meta:creation-date>
    <dc:date>2026-05-09T11:45:50.467710096</dc:date>
    <meta:editing-duration>P4DT5H22M46S</meta:editing-duration>
    <meta:editing-cycles>18</meta:editing-cycles>
    <meta:generator>LibreOffice/24.2.7.2$Linux_X86_64 LibreOffice_project/420$Build-2</meta:generator>
    <meta:document-statistic meta:object-count="32"/>
  </office:meta>
</office:document-meta>
</file>